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paragraph-rsid="000b54ed" style:font-weight-asian="bold" style:font-weight-complex="bold"/>
    </style:style>
    <style:style style:name="P4" style:family="paragraph" style:parent-style-name="Standard">
      <style:text-properties fo:font-weight="bold" officeooo:paragraph-rsid="00110822" style:font-weight-asian="bold" style:font-weight-complex="bold"/>
    </style:style>
    <style:style style:name="P5" style:family="paragraph" style:parent-style-name="Standard">
      <style:text-properties officeooo:paragraph-rsid="000b54ed"/>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font-size="14pt" fo:font-weight="bold" officeooo:paragraph-rsid="00110822" style:font-size-asian="14pt" style:font-weight-asian="bold" style:font-size-complex="14pt" style:font-weight-complex="bold"/>
    </style:style>
    <style:style style:name="P8" style:family="paragraph" style:parent-style-name="Standard" style:list-style-name="L1"/>
    <style:style style:name="P9" style:family="paragraph" style:parent-style-name="Standard" style:list-style-name="L1">
      <style:text-properties officeooo:paragraph-rsid="00110822"/>
    </style:style>
    <style:style style:name="P10" style:family="paragraph" style:parent-style-name="Standard" style:list-style-name="L2"/>
    <style:style style:name="P11" style:family="paragraph" style:parent-style-name="Standard" style:list-style-name="L3">
      <style:text-properties officeooo:paragraph-rsid="00110822"/>
    </style:style>
    <style:style style:name="P12" style:family="paragraph" style:parent-style-name="Standard">
      <style:text-properties officeooo:paragraph-rsid="00110822"/>
    </style:style>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T1" style:family="text">
      <style:text-properties officeooo:rsid="000b54ed"/>
    </style:style>
    <style:style style:name="T2" style:family="text">
      <style:text-properties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fo:font-weight="bold" officeooo:rsid="000b54ed" style:font-weight-asian="bold" style:font-weight-complex="bold"/>
    </style:style>
    <style:style style:name="T5" style:family="text">
      <style:text-properties fo:font-weight="bold" officeooo:rsid="000f7002" style:font-weight-asian="bold" style:font-weight-complex="bold"/>
    </style:style>
    <style:style style:name="T6" style:family="text">
      <style:text-properties fo:font-weight="bold" officeooo:rsid="00110822"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0f7002"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0b54ed" style:font-style-asian="italic" style:font-weight-asian="bold" style:font-style-complex="italic" style:font-weight-complex="bold"/>
    </style:style>
    <style:style style:name="T11" style:family="text">
      <style:text-properties officeooo:rsid="000d8e04"/>
    </style:style>
    <style:style style:name="T12" style:family="text">
      <style:text-properties officeooo:rsid="000f7002"/>
    </style:style>
    <style:style style:name="T13" style:family="text">
      <style:text-properties officeooo:rsid="0011082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RE PROBLEM STATEMENT REPORT</text:h>
      <text:p text:style-name="Quotations">Target Conference: IEEE International Conference on Acoustics, Speech, and Signal Processing (ICASSP 2027, Toronto) <text:s/>- IEEE ICASSP</text:p>
      <text:h text:style-name="P1" text:outline-level="2"><text:span text:style-name="T2">Modular Edge-Assisted Speech Architectures for Code-Switched Cardiovascular Healthcare</text:span></text:h>
      <text:p text:style-name="Standard">Experimental Hardware Platform: NVIDIA RTX PRO 5000 (Blackwell Generation, Compute Capability sm_120), Linux, PyTorch Nightly (cu124)</text:p>
      <text:p text:style-name="Standard"/>
      <text:h text:style-name="Heading_20_3" text:outline-level="3">1. OVERVIEW OF WORK DONE SO FAR</text:h>
      <text:p text:style-name="Standard">This project aims to engineer an open-source, real-time, multilingual conversational speech assistant for cardiology patient care deployed locally on high-performance edge hardware. The system must navigate <text:span text:style-name="T1">these </text:span>critical domain constraints: (1) <text:span text:style-name="T1">Empathy support based on patient’s condition</text:span>; (2) Linguistic Flexibility: supporting dynamic code-switching across English, Hindi, and Hinglish without cognitive drop-off; and (3) Clinical Safety: guaranteeing near-instant conversational latency while enforcing zero-hallucination medical reasoning.</text:p>
      <text:p text:style-name="Standard"/>
      <text:p text:style-name="Standard">To arrive at our optimal target architecture, we conducted a systematic empirical exploration across three distinct speech AI paradigms:</text:p>
      <text:p text:style-name="Standard"/>
      <text:p text:style-name="Standard"><text:span text:style-name="T3">[1: Cascaded Modular] <text:s/></text:span><text:s/>VAD ➔ Faster-Whisper ➔ LLM (Qwen/Nemotron) ➔ Coqui XTTS</text:p>
      <text:p text:style-name="Standard"><text:s text:c="30"/>├── ✔ Fast processing (~1.5s TTFA)</text:p>
      <text:p text:style-name="Standard"><text:s text:c="30"/>└── ✖ ASR Phonetic Error Cascading, <text:span text:style-name="T1">Tokenizer Assymmetry</text:span> &amp; <text:span text:style-name="T11">Poor Clinical </text:span><text:span text:style-name="T1">Reasoning </text:span><text:span text:style-name="T11">and Safety Assessment</text:span></text:p>
      <text:p text:style-name="Standard"/>
      <text:p text:style-name="Standard"><text:span text:style-name="T3">[2: Semi-Multimodal] </text:span><text:s text:c="3"/>VAD ➔ Gemma Audio Native Core ➔ Parler TTS</text:p>
      <text:p text:style-name="Standard"><text:s text:c="30"/>├── ✔ No ASR error propagation; superior acoustic reasoning</text:p>
      <text:p text:style-name="Standard"><text:s text:c="30"/>└── ✖ Severe latency inflation (~8.8s TTFA) via Tag Blockade</text:p>
      <text:p text:style-name="Standard"/>
      <text:p text:style-name="Standard"><text:span text:style-name="T3">[3: End-to-End Test] <text:s/></text:span><text:s text:c="2"/>VAD ➔ Meta SeamlessM4T v2 (UnitY2 Core)</text:p>
      <text:p text:style-name="Standard"><text:s text:c="30"/>├── ✔ Exceptional, <text:span text:style-name="T1">fast</text:span> zero-shot Indic speech &amp; voice translation</text:p>
      <text:p text:style-name="Standard"><text:s text:c="30"/>└── ✖ Lacks instruction-tuned clinical reasoning &amp; persona</text:p>
      <text:p text:style-name="Standard"><text:span text:style-name="T9"><text:s/></text:span><text:span text:style-name="T10">Refactored to modular pipeline 1.2: </text:span>VAD ➔ SeamlessM4T Hub (STT/TTS) + Nemotron Brain</text:p>
      <text:p text:style-name="Standard"/>
      <text:p text:style-name="Standard"/>
      <text:h text:style-name="Heading_20_3" text:outline-level="3">2. TARGET PROBLEM STATEMENTS FOR ICASSP 2027 &amp; WORK TO BE DONE</text:h>
      <text:p text:style-name="P6">PROBLEM STATEMENT 1</text:p>
      <text:p text:style-name="Standard"><text:span text:style-name="T3">Track:</text:span> Speech and Language Processing (SLP) / Audio and Acoustic Signal Processing (AASP)</text:p>
      <text:p text:style-name="Standard"><text:span text:style-name="T3">Research Title: </text:span>Mitigating Acoustic-to-Semantic Error Propagation in Code-Switched Medical ASR via Phonetic-Biased Levenshtein Bridges</text:p>
      <text:p text:style-name="Standard"/>
      <text:p text:style-name="Standard"><text:span text:style-name="T3">The Scientific Gap: </text:span>In clinical edge environments, standard automatic speech recognition (ASR) systems exhibit high Word Error Rates (WER) when encountering domain-specific cardiology nomenclature uttered in slurred, weak, or code-switched (Hinglish) dialects. Conventional WER treats all word substitutions equally, failing to capture that a single phonetic hallucination on a <text:soft-page-break/>pharmaceutical name or diagnostic metric can trigger catastrophic semantic hallucinations in the downstream LLM.</text:p>
      <text:p text:style-name="Standard"/>
      <text:p text:style-name="Standard"><text:span text:style-name="T3">Proposed Technical Solution: </text:span>1. Establish two new domain-specific evaluation metrics: Medical Entity Error Rate (MER) and Emergency Recognition Accuracy (ERA).</text:p>
      <text:p text:style-name="Standard">2. Implement an algorithmic middleware: the Semantic-Biased Phonetic Levenshtein Bridge. Instead of passing raw ASR text directly to the LLM, the transcript streams through a phonemic distance matcher hardcoded to an exhaustive cardiovascular ontology (e.g., medications, anatomical terms, dosage units). When low-confidence acoustic tokens (e.g., "menstrual bulk recarbitation") are detected, the matcher calculates the phonetic Levenshtein distance in phoneme space and executes a real-time semantic correction to the nearest valid clinical entity ("mitral valve regurgitation") before tokenization by the LLM.</text:p>
      <text:p text:style-name="Standard"/>
      <text:p text:style-name="P2">Methodology &amp; Implementation Plan:</text:p>
      <text:list text:style-name="L4">
        <text:list-item>
          <text:p text:style-name="P13"><text:span text:style-name="T3">Dataset Engineering: </text:span>Curate a standardized evaluation benchmark of 300–500 conversational turns by combining clean Hindi/Hinglish baseline speech from the Kathbath and Lahaja corpora with clinical cardiology terms from the EkaCare Clinical Voice Dataset.</text:p>
        </text:list-item>
      </text:list>
      <text:p text:style-name="Standard"/>
      <text:list text:continue-numbering="true" text:style-name="L4">
        <text:list-item>
          <text:p text:style-name="P13"><text:span text:style-name="T3">Acoustic Stress Augmentation:</text:span> Systematically overlay physiological respiratory distress anomalies (coughing, wheezing, gasping from the Nonspeech7k and VocalSound datasets) and ambient hospital noise at varying Signal-to-Noise Ratios (SNRs: 0dB, 5dB, 10dB, 15dB).</text:p>
        </text:list-item>
      </text:list>
      <text:p text:style-name="Standard"/>
      <text:p text:style-name="P7">PROBLEM STATEMENT <text:span text:style-name="T12">2</text:span></text:p>
      <text:p text:style-name="P12"><text:span text:style-name="T3">Track:</text:span> Multimedia Signal Processing (MMSP) / Speech and Language Processing (SLP)</text:p>
      <text:p text:style-name="P12"><text:span text:style-name="T3">Track Sub-Topic:</text:span> Multimodal Emotion &amp; Urgency Recognition, Cross-Modal Speech Synthesis and Interaction.</text:p>
      <text:p text:style-name="P12"/>
      <text:p text:style-name="P12"><text:span text:style-name="T3">Research Title:</text:span> Acoustically Conditioned Gated Fusion Matrices for Cross-Modal Empathy and Low-Latency Emergency Interception in Clinical Voice Agents</text:p>
      <text:p text:style-name="P12"/>
      <text:p text:style-name="P12"><text:span text:style-name="T3">The Scientific Gap: </text:span>Conventional modular and semi-multimodal edge health assistants suffer from "Acoustic Blindness". They treat patient audio transcripts as purely textual representations. If an acute cardiovascular patient gasps "My chest feels tight" due to an active myocardial infarction, a standard ASR-to-LLM pipeline strips away the vital acoustic markers of physical trauma (e.g., altered fundamental frequency F0, high jitter, breathless pauses). The text engine receives the exact same character array as a calm patient reading a baseline report, resulting in detached, templated empathy responses and delayed medical escalations. Furthermore, routing complex diagnostic choices entirely through an LLM introduces a processing bottleneck, which is unsafe during real-world respiratory emergencies. <text:s/></text:p>
      <text:p text:style-name="P12"/>
      <text:p text:style-name="P12"><text:span text:style-name="T3">Proposed Technical Solution:</text:span> We <text:span text:style-name="T12">can</text:span> introduce a Dual-Path Cross-Modal Gated Fusion Hub that integrates acoustic feature extraction directly with semantic processing:</text:p>
      <text:p text:style-name="P12"/>
      <text:list text:style-name="L1">
        <text:list-item>
          <text:p text:style-name="P9">Acoustic Urgency Vector (AUV) Extractor: Localized speech processing middleware extracts signal-level markers (Mel-Frequency Cepstral Coefficients [MFCCs], prosody variance, and speech-rate density) to calculate an operational scalar value for physiological distress.</text:p>
        </text:list-item>
      </text:list>
      <text:p text:style-name="P12"/>
      <text:list text:continue-numbering="true" text:style-name="L1">
        <text:list-item>
          <text:p text:style-name="P9">Multimodal Gated Interception Matrix: A non-linear mathematical gating function processes the AUV alongside semantic embeddings from an initial token layer. If the input exceeds an engineered acoustic urgency or lexical trauma threshold, a hardwired signal interrupt <text:soft-page-break/>completely bypasses the standard LLM generation queue. This instantly triggers high-urgency directives to Linux’s native playback audio buffer. <text:s/></text:p>
        </text:list-item>
      </text:list>
      <text:p text:style-name="P12"/>
      <text:list text:continue-numbering="true" text:style-name="L1">
        <text:list-item>
          <text:p text:style-name="P9">Acoustically Conditioned Synthesis Conditioning: For sub-critical turns, the AUV is embedded as an initialization token within the shared latent space between the core text brain and the speech synthesis system (e.g., Coqui XTTS-v2/SeamlessM4T backend). This forces the output vocoder to contextually mirror the patient's emotional state with variable prosody rather than using robotic, pre-scripted phrases. <text:s/></text:p>
        </text:list-item>
      </text:list>
      <text:p text:style-name="P12"/>
      <text:p text:style-name="P12"/>
      <text:p text:style-name="P4">Methodology &amp; Implementation Plan:</text:p>
      <text:list text:style-name="L3">
        <text:list-item>
          <text:p text:style-name="P11"><text:span text:style-name="T3">Feature Extraction Architecture:</text:span> Implement a parallel signal-processing thread in Python using librosa and torchaudio. While audio flows into the ASR/Foundation engine frontend, the sub-thread computes: <text:span text:style-name="T7">Distress Score (Ds)=α⋅ΔF0 +β⋅ZCR+γ⋅Pause Density</text:span>- populates the Acoustic Urgency Vector (AUV).</text:p>
        </text:list-item>
      </text:list>
      <text:p text:style-name="P12"/>
      <text:list text:continue-numbering="true" text:style-name="L3">
        <text:list-item>
          <text:p text:style-name="P11"><text:span text:style-name="T3">Dataset Integration &amp; Synthesis:</text:span> Because true cardiovascular patient distress audio is scarce, we <text:span text:style-name="T12">may have to </text:span>construct a robust synthetic evaluation corpus: Mix<text:span text:style-name="T12">ing</text:span> baseline clinical text scripts with the VocalSound and Nonspeech7k datasets to introduce controlled levels of heavy breathing, gasping, coughing, and wheezing overlays at varied Signal-to-Noise Ratios (SNRs).</text:p>
        </text:list-item>
      </text:list>
      <text:p text:style-name="P12"/>
      <text:list text:continue-numbering="true" text:style-name="L3">
        <text:list-item>
          <text:p text:style-name="P11">Us<text:span text:style-name="T12">ing</text:span> the <text:span text:style-name="T3">MMSP Multimodal Emotion Recognition benchmarks</text:span> to validate the classification accuracy of our gated state machine.</text:p>
        </text:list-item>
      </text:list>
      <text:p text:style-name="P12"/>
      <text:list text:continue-numbering="true" text:style-name="L3">
        <text:list-item>
          <text:p text:style-name="P11"><text:span text:style-name="T3">Gated Router Implementation:</text:span> Writ<text:span text:style-name="T12">ing</text:span> a customized orchestration script that intercepts the conversational pipeline between the VAD and the core reasoning engine. Implement<text:span text:style-name="T12">ing</text:span> a mathematical rule-based conditional layer: IF <text:span text:style-name="T7">Ds &gt;τacoustic OR Tokenmed</text:span><text:span text:style-name="T8">i</text:span><text:span text:style-name="T7">cal ∈{"frothy liquid","crushing pain"}</text:span>⟹Route to Direct Emergency Macro</text:p>
        </text:list-item>
      </text:list>
      <text:p text:style-name="P12"/>
      <text:p text:style-name="P12"><text:span text:style-name="T5">Addition Evaluation</text:span><text:span text:style-name="T3"> Metric</text:span><text:span text:style-name="T5">s</text:span><text:span text:style-name="T3">: </text:span>Emergency Triaging Latency (ETL<text:span text:style-name="T12">), </text:span>Tone Mirroring Naturalness (MOS<text:span text:style-name="T12">), </text:span>False Negative Emergency Misses</text:p>
      <text:p text:style-name="P12"/>
      <text:p text:style-name="P6">PROBLEM STATEMENT <text:span text:style-name="T12">3</text:span></text:p>
      <text:p text:style-name="Standard"><text:span text:style-name="T3">Track: </text:span>Machine Learning for Signal Processing (MLSP) / Multimedia Signal Processing (MSP)</text:p>
      <text:p text:style-name="Standard">Research Title: Asynchronous Token-Streaming State Machines for Sub-Second Time-to-First-Audio (TTFA) in Structured Multimodal Edge Pipelines</text:p>
      <text:p text:style-name="Standard"/>
      <text:p text:style-name="Standard"><text:span text:style-name="T3">The Scientific Gap:</text:span> Advanced clinical speech assistants require LLMs to emit structured metadata (e.g., &lt;response_lang=hi&gt;, &lt;emotion=empathetic&gt;, JSON logging blocks) to dynamically route downstream text-to-speech (TTS) engines and maintain clinical guardrails. However, synchronous decoding pipelines must wait for the closing structural tags before initiating audio synthesis. This "Structural Tag Blockade" inflates streaming latency on edge GPUs, pushing TTFA beyond human conversational tolerance (&gt;8 seconds).</text:p>
      <text:p text:style-name="Standard"/>
      <text:p text:style-name="Standard"><text:span text:style-name="T3">Proposed Technical Solution: </text:span>Design and implement an Asynchronous Token-Streaming Parser (ATSP) coupled with a Dual-Stream CUDA Execution Architecture. The ATSP is a lightweight, non-blocking state machine that intercepts the raw LLM token stream byte-by-byte at inference time. The moment the internal state machine validates the opening &lt;response&gt; boundary token, it suppresses metadata printing, unblocks downstream TTS queues, strips XML formatting on-the-fly, and chunks text sentence-by-sentence based on acoustic pause punctuation (., ?, |).</text:p>
      <text:p text:style-name="Standard"/>
      <text:p text:style-name="P2"><text:soft-page-break/>Methodology &amp; Implementation Plan:</text:p>
      <text:list text:style-name="L5">
        <text:list-item>
          <text:p text:style-name="P14"><text:span text:style-name="T3">Mathematical Formalization: </text:span>Formulate the latency equations governing sequential modular generation versus asynchronous token-interleaved generation, establishing the theoretical lower bound of TTFA on edge compute architectures.</text:p>
        </text:list-item>
      </text:list>
      <text:p text:style-name="Standard"/>
      <text:list text:continue-numbering="true" text:style-name="L5">
        <text:list-item>
          <text:p text:style-name="P14"><text:span text:style-name="T3">CUDA Stream Parallelization: </text:span>Refine xtts_engine.py and styletts2_engine.py to instantiate a secondary CUDA stream (self.tts_stream = torch.cuda.Stream()). While the LLM generates reasoning tokens on the default CUDA stream, the extracted sentence chunks are pushed asynchronously to self.tts_stream, enabling simultaneous GPU execution of transformer decoding and diffusion/vocoder audio synthesis.</text:p>
        </text:list-item>
      </text:list>
      <text:p text:style-name="Standard"/>
      <text:p text:style-name="P6">PROBLEM STATEMENT <text:span text:style-name="T13">4</text:span></text:p>
      <text:p text:style-name="Standard"><text:span text:style-name="T3">Track: </text:span>Speech and Language Processing (SLP) / Biomedical Signal Processing (BI)</text:p>
      <text:p text:style-name="Standard"><text:span text:style-name="T3">Research Title: </text:span>Sanitizing Autoregressive Acoustic Hallucinations and "Filler Babble" in Zero-Shot Indic Voice Synthesis</text:p>
      <text:p text:style-name="Standard"/>
      <text:p text:style-name="Standard"><text:span text:style-name="T3">The Scientific Gap: </text:span>Autoregressive neural TTS architectures (e.g., Coqui XTTS-v2, Parler TTS) experience catastrophic Cross-Attention Alignment Drift during zero-shot voice cloning when generating code-switched Hinglish text or processing short, streamed sentence chunks. When attention matrices lose alignment between script densities (ASCII vs. Devanagari), the decoder fails to emit acoustic End-of-Sequence (EOS) tokens. This causes the model to hallucinate continuous trailing vocal murmurs, ghostly whispering, or repetitive "filler babble" amplified from background background noise present in the reference latent embedding.</text:p>
      <text:p text:style-name="Standard"/>
      <text:p text:style-name="Standard"><text:span text:style-name="T3">Proposed Technical Solution: </text:span>Engineering a Tri-Stage Acoustic Sanitization Pipeline:</text:p>
      <text:p text:style-name="Standard"/>
      <text:list text:style-name="L6">
        <text:list-item>
          <text:p text:style-name="P15"><text:span text:style-name="T3">Reference Latent Denoising: </text:span>Pre-processing the 5-second speaker reference profile (doctor_voice.wav) using spectral gating and stationary noise suppression before computing conditioning latents on the CPU, preventing ambient room hiss from being encoded as vocal identity features.</text:p>
        </text:list-item>
      </text:list>
      <text:p text:style-name="Standard"/>
      <text:list text:continue-numbering="true" text:style-name="L6">
        <text:list-item>
          <text:p text:style-name="P15"><text:span text:style-name="T3">Indic Text Normalization &amp; Padding Middleware: </text:span>A real-time pre-processor that converts numerical digits to Devanagari words (replace_numbers_with_hindi_words), strips markdown symbols, and enforces a minimum character-length threshold per streaming chunk to stabilize cross-attention attention matrices.</text:p>
        </text:list-item>
      </text:list>
      <text:p text:style-name="Standard"/>
      <text:list text:continue-numbering="true" text:style-name="L6">
        <text:list-item>
          <text:p text:style-name="P15"><text:span text:style-name="T3">Energy-Threshold Truncation Guardrail: </text:span>A fast, post-synthesis acoustic guardrail applying Short-Time Energy (STE) and Zero-Crossing Rate (ZCR) analysis to generated audio arrays, instantaneously truncating low-energy trailing murmurs before routing waveforms to Linux’s native ALSA aplay buffer.</text:p>
        </text:list-item>
      </text:list>
      <text:p text:style-name="Standard"/>
      <text:p text:style-name="Standard"><text:span text:style-name="T6">Additional Evaluation</text:span><text:span text:style-name="T3"> Metrics: </text:span>Compute Mel-Cepstral Distortion (MCD), F0 Frame Error (FFE), and the acoustic hallucination rate (percentage of synthesized chunks containing trailing babble &gt;200ms post-text completion) across baseline XTTS versus our Sanitized Tri-Stage Pipeline.</text:p>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13T15:10:54.630565260</meta:creation-date>
    <dc:date>2026-07-13T16:12:31.403126477</dc:date>
    <meta:editing-duration>PT8M45S</meta:editing-duration>
    <meta:editing-cycles>2</meta:editing-cycles>
    <meta:generator>LibreOffice/24.2.7.2$Linux_AARCH64 LibreOffice_project/420$Build-2</meta:generator>
    <meta:document-statistic meta:table-count="0" meta:image-count="0" meta:object-count="0" meta:page-count="4" meta:paragraph-count="59" meta:word-count="1496" meta:character-count="11832" meta:non-whitespace-character-count="10214"/>
  </office:meta>
</office:document-meta>
</file>