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Google Sans" svg:font-family="'Google Sans'" style:font-family-generic="swiss"/>
    <style:font-face style:name="Google Sans1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Horizontal_20_Line">
      <style:text-properties fo:color="#bbbebf" loext:opacity="100%" style:font-name="Google Sans" fo:font-size="10.5pt" fo:font-weight="normal" fo:background-color="#121314"/>
    </style:style>
    <style:style style:name="P2" style:family="paragraph" style:parent-style-name="Heading_20_2">
      <style:paragraph-properties fo:margin-left="0in" fo:margin-right="0in" fo:text-indent="0in" style:auto-text-indent="false"/>
      <style:text-properties style:font-name="Google Sans" fo:font-size="12pt" fo:font-weight="bold"/>
    </style:style>
    <style:style style:name="P3" style:family="paragraph" style:parent-style-name="Heading_20_2">
      <style:paragraph-properties fo:margin-left="0in" fo:margin-right="0in" fo:text-indent="0in" style:auto-text-indent="false"/>
      <style:text-properties style:font-name="Google Sans" fo:font-size="12pt" fo:font-weight="bold" officeooo:paragraph-rsid="000f0fc0"/>
    </style:style>
    <style:style style:name="P4" style:family="paragraph" style:parent-style-name="Heading_20_2">
      <style:paragraph-properties fo:margin-top="0in" fo:margin-bottom="0.1965in" style:contextual-spacing="false" style:line-height-at-least="0.198in"/>
      <style:text-properties fo:color="#bbbebf" loext:opacity="100%" style:font-name="Google Sans" fo:font-size="15pt" fo:font-weight="bold" fo:background-color="#121314"/>
    </style:style>
    <style:style style:name="P5" style:family="paragraph" style:parent-style-name="Heading_20_3">
      <style:paragraph-properties fo:margin-top="0in" fo:margin-bottom="0.1965in" style:contextual-spacing="false" style:line-height-at-least="0.198in"/>
      <style:text-properties style:font-name="Google Sans"/>
    </style:style>
    <style:style style:name="P6" style:family="paragraph" style:parent-style-name="Heading_20_3">
      <style:paragraph-properties fo:margin-top="0in" fo:margin-bottom="0.1965in" style:contextual-spacing="false" style:line-height-at-least="0.198in"/>
      <style:text-properties fo:color="#111111" loext:opacity="100%" style:font-name="Google Sans" fo:font-size="14pt" fo:font-weight="bold" fo:background-color="transparent" style:font-size-asian="14pt" style:font-weight-asian="bold" style:font-size-complex="14pt" style:font-weight-complex="bold"/>
    </style:style>
    <style:style style:name="P7" style:family="paragraph" style:parent-style-name="Heading_20_3">
      <style:paragraph-properties fo:margin-top="0in" fo:margin-bottom="0.1965in" style:contextual-spacing="false" style:line-height-at-least="0.198in"/>
      <style:text-properties fo:color="#111111" loext:opacity="100%" fo:font-size="14pt" fo:font-weight="bold" fo:background-color="transparent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in" fo:margin-bottom="0.1965in" style:contextual-spacing="false" style:line-height-at-least="0.198in"/>
      <style:text-properties fo:color="#bbbebf" loext:opacity="100%" style:text-line-through-style="none" style:text-line-through-type="none" style:font-name="Google Sans" fo:font-size="15pt" style:text-underline-style="none" fo:font-weight="bold" officeooo:paragraph-rsid="000d2131" style:text-blinking="false" fo:background-color="#121314" loext:padding="0in" loext:border="none"/>
    </style:style>
    <style:style style:name="P9" style:family="paragraph" style:parent-style-name="Standard">
      <style:paragraph-properties fo:margin-top="0in" fo:margin-bottom="0.1965in" style:contextual-spacing="false" style:line-height-at-least="0.198in"/>
      <style:text-properties fo:color="#bbbebf" loext:opacity="100%" style:font-name="Google Sans" fo:font-size="10.5pt" fo:font-weight="normal" fo:background-color="#121314"/>
    </style:style>
    <style:style style:name="P10" style:family="paragraph" style:parent-style-name="Standard">
      <style:paragraph-properties fo:margin-left="0in" fo:margin-right="0in" style:line-height-at-least="0.198in" fo:text-indent="0in" style:auto-text-indent="false"/>
      <style:text-properties fo:color="#bbbebf" loext:opacity="100%" style:font-name="Google Sans" fo:font-size="10.5pt" fo:font-weight="normal" fo:background-color="#121314"/>
    </style:style>
    <style:style style:name="P11" style:family="paragraph" style:parent-style-name="Standard">
      <style:paragraph-properties style:line-height-at-least="0.198in"/>
      <style:text-properties fo:color="#bbbebf" loext:opacity="100%" style:font-name="Google Sans" fo:font-size="10.5pt" fo:font-weight="normal" fo:background-color="#121314"/>
    </style:style>
    <style:style style:name="P12" style:family="paragraph" style:parent-style-name="Standard">
      <style:paragraph-properties fo:margin-left="0in" fo:margin-right="0in" style:line-height-at-least="0.198in" fo:text-indent="0in" style:auto-text-indent="false"/>
      <style:text-properties fo:color="#bbbebf" loext:opacity="100%" style:font-name="Google Sans" fo:font-size="10.5pt" fo:font-weight="normal" officeooo:paragraph-rsid="000a1850" fo:background-color="#121314"/>
    </style:style>
    <style:style style:name="P13" style:family="paragraph" style:parent-style-name="Standard">
      <style:paragraph-properties fo:margin-top="0in" fo:margin-bottom="0.1965in" style:contextual-spacing="false" style:line-height-at-least="0.198in"/>
    </style:style>
    <style:style style:name="P14" style:family="paragraph" style:parent-style-name="Standard">
      <style:paragraph-properties fo:margin-left="0in" fo:margin-right="0in" style:line-height-at-least="0.198in" fo:text-indent="0in" style:auto-text-indent="false"/>
      <style:text-properties fo:color="#79c0ff" loext:opacity="100%" style:font-name="Google Sans" fo:font-size="10.5pt" fo:font-weight="bold" fo:background-color="#121314"/>
    </style:style>
    <style:style style:name="P15" style:family="paragraph" style:parent-style-name="Standard">
      <style:paragraph-properties fo:margin-left="0in" fo:margin-right="0in" fo:margin-top="0.25in" fo:margin-bottom="0.1252in" style:contextual-spacing="false" fo:text-indent="0in" style:auto-text-indent="false"/>
      <style:text-properties style:text-line-through-style="none" style:text-line-through-type="none" style:font-name="Google Sans" fo:font-size="12pt" style:text-underline-style="none" fo:font-weight="bold" style:text-blinking="false" loext:padding="0in" loext:border="none"/>
    </style:style>
    <style:style style:name="P16" style:family="paragraph" style:parent-style-name="Standard">
      <style:paragraph-properties fo:margin-top="0in" fo:margin-bottom="0.1965in" style:contextual-spacing="false" style:line-height-at-least="0.198in"/>
      <style:text-properties style:font-name="Google Sans"/>
    </style:style>
    <style:style style:name="P17" style:family="paragraph" style:parent-style-name="Standard">
      <style:paragraph-properties style:line-height-at-least="0.198in"/>
      <style:text-properties style:font-name="Google Sans"/>
    </style:style>
    <style:style style:name="P18" style:family="paragraph" style:parent-style-name="Standard" style:list-style-name="L10">
      <style:text-properties officeooo:paragraph-rsid="00117d37"/>
    </style:style>
    <style:style style:name="P19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0" style:family="paragraph" style:parent-style-name="Text_20_body">
      <style:paragraph-properties fo:margin-top="0in" fo:margin-bottom="0in" style:contextual-spacing="false"/>
    </style:style>
    <style:style style:name="P21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2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  <style:text-properties officeooo:paragraph-rsid="000d2131"/>
    </style:style>
    <style:style style:name="P23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/>
      <style:text-properties officeooo:paragraph-rsid="000f0fc0"/>
    </style:style>
    <style:style style:name="P24" style:family="paragraph" style:parent-style-name="Text_20_body">
      <style:paragraph-properties fo:margin-left="0in" fo:margin-right="0in" fo:text-indent="0in" style:auto-text-indent="false"/>
    </style:style>
    <style:style style:name="P25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/>
      <style:text-properties fo:font-weight="normal"/>
    </style:style>
    <style:style style:name="P26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/>
      <style:text-properties style:font-name="Google Sans"/>
    </style:style>
    <style:style style:name="P27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/>
      <style:text-properties style:font-name="Google Sans"/>
    </style:style>
    <style:style style:name="P28" style:family="paragraph" style:parent-style-name="Text_20_body" style:list-style-name="L6">
      <style:paragraph-properties fo:margin-left="0in" fo:margin-right="0in" fo:text-indent="0in" style:auto-text-indent="false"/>
      <style:text-properties style:font-name="Google Sans"/>
    </style:style>
    <style:style style:name="P29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/>
    </style:style>
    <style:style style:name="P30" style:family="paragraph" style:parent-style-name="Text_20_body" style:list-style-name="L7"/>
    <style:style style:name="P31" style:family="paragraph" style:parent-style-name="Text_20_body" style:list-style-name="L7">
      <style:paragraph-properties fo:margin-left="0in" fo:margin-right="0in" fo:margin-top="0in" fo:margin-bottom="0in" style:contextual-spacing="false" fo:text-indent="0in" style:auto-text-indent="false"/>
    </style:style>
    <style:style style:name="P32" style:family="paragraph" style:parent-style-name="Text_20_body" style:list-style-name="L8"/>
    <style:style style:name="P33" style:family="paragraph" style:parent-style-name="Text_20_body" style:list-style-name="L8">
      <style:paragraph-properties fo:margin-top="0in" fo:margin-bottom="0in" style:contextual-spacing="false"/>
    </style:style>
    <style:style style:name="P34" style:family="paragraph" style:parent-style-name="Text_20_body" style:list-style-name="L8">
      <style:paragraph-properties fo:margin-left="0in" fo:margin-right="0in" fo:margin-top="0in" fo:margin-bottom="0in" style:contextual-spacing="false" fo:text-indent="0in" style:auto-text-indent="false"/>
    </style:style>
    <style:style style:name="P35" style:family="paragraph" style:parent-style-name="Text_20_body" style:list-style-name="L9"/>
    <style:style style:name="P36" style:family="paragraph" style:parent-style-name="Text_20_body" style:list-style-name="L9">
      <style:paragraph-properties fo:margin-top="0in" fo:margin-bottom="0in" style:contextual-spacing="false"/>
    </style:style>
    <style:style style:name="P37" style:family="paragraph" style:parent-style-name="Text_20_body" style:list-style-name="L9">
      <style:paragraph-properties fo:margin-left="0in" fo:margin-right="0in" fo:margin-top="0in" fo:margin-bottom="0in" style:contextual-spacing="false" fo:text-indent="0in" style:auto-text-indent="false"/>
    </style:style>
    <style:style style:name="P38" style:family="paragraph" style:parent-style-name="Text_20_body" style:list-style-name="L10">
      <style:paragraph-properties fo:margin-left="0in" fo:margin-right="0in" fo:margin-top="0in" fo:margin-bottom="0in" style:contextual-spacing="false" fo:text-indent="0in" style:auto-text-indent="false"/>
    </style:style>
    <style:style style:name="P39" style:family="paragraph" style:parent-style-name="Text_20_body" style:list-style-name="L10">
      <style:text-properties officeooo:paragraph-rsid="00117d37"/>
    </style:style>
    <style:style style:name="P40" style:family="paragraph" style:parent-style-name="Text_20_body" style:list-style-name="L11"/>
    <style:style style:name="P41" style:family="paragraph" style:parent-style-name="Text_20_body" style:list-style-name="L11">
      <style:paragraph-properties fo:margin-top="0in" fo:margin-bottom="0in" style:contextual-spacing="false"/>
    </style:style>
    <style:style style:name="P42" style:family="paragraph" style:parent-style-name="Text_20_body" style:list-style-name="L11">
      <style:paragraph-properties fo:margin-left="0in" fo:margin-right="0in" fo:margin-top="0in" fo:margin-bottom="0in" style:contextual-spacing="false" fo:text-indent="0in" style:auto-text-indent="false"/>
    </style:style>
    <style:style style:name="P43" style:family="paragraph" style:parent-style-name="Text_20_body" style:list-style-name="L12"/>
    <style:style style:name="P44" style:family="paragraph" style:parent-style-name="Text_20_body" style:list-style-name="L12">
      <style:paragraph-properties fo:margin-top="0in" fo:margin-bottom="0in" style:contextual-spacing="false"/>
    </style:style>
    <style:style style:name="P45" style:family="paragraph" style:parent-style-name="Text_20_body" style:list-style-name="L12">
      <style:paragraph-properties fo:margin-left="0in" fo:margin-right="0in" fo:margin-top="0in" fo:margin-bottom="0in" style:contextual-spacing="false" fo:text-indent="0in" style:auto-text-indent="false"/>
    </style:style>
    <style:style style:name="P46" style:family="paragraph" style:parent-style-name="Text_20_body" style:list-style-name="L13"/>
    <style:style style:name="P47" style:family="paragraph" style:parent-style-name="Text_20_body" style:list-style-name="L13">
      <style:paragraph-properties fo:margin-left="0in" fo:margin-right="0in" fo:margin-top="0in" fo:margin-bottom="0in" style:contextual-spacing="false" fo:text-indent="0in" style:auto-text-indent="false"/>
    </style:style>
    <style:style style:name="P48" style:family="paragraph" style:parent-style-name="Text_20_body" style:list-style-name="L14"/>
    <style:style style:name="P49" style:family="paragraph" style:parent-style-name="Text_20_body" style:list-style-name="L14">
      <style:paragraph-properties fo:margin-top="0in" fo:margin-bottom="0in" style:contextual-spacing="false"/>
    </style:style>
    <style:style style:name="P50" style:family="paragraph" style:parent-style-name="Text_20_body" style:list-style-name="L14">
      <style:paragraph-properties fo:margin-left="0in" fo:margin-right="0in" fo:margin-top="0in" fo:margin-bottom="0in" style:contextual-spacing="false" fo:text-indent="0in" style:auto-text-indent="false"/>
    </style:style>
    <style:style style:name="P51" style:family="paragraph" style:parent-style-name="Text_20_body" style:list-style-name="L15"/>
    <style:style style:name="P52" style:family="paragraph" style:parent-style-name="Text_20_body" style:list-style-name="L15">
      <style:paragraph-properties fo:margin-top="0in" fo:margin-bottom="0in" style:contextual-spacing="false"/>
    </style:style>
    <style:style style:name="P53" style:family="paragraph" style:parent-style-name="Text_20_body" style:list-style-name="L15">
      <style:paragraph-properties fo:margin-left="0in" fo:margin-right="0in" fo:margin-top="0in" fo:margin-bottom="0in" style:contextual-spacing="false" fo:text-indent="0in" style:auto-text-indent="false"/>
    </style:style>
    <style:style style:name="P54" style:family="paragraph" style:parent-style-name="Text_20_body" style:list-style-name="L16"/>
    <style:style style:name="P55" style:family="paragraph" style:parent-style-name="Text_20_body" style:list-style-name="L16">
      <style:paragraph-properties fo:margin-left="0in" fo:margin-right="0in" fo:margin-top="0in" fo:margin-bottom="0in" style:contextual-spacing="false" fo:text-indent="0in" style:auto-text-indent="false"/>
    </style:style>
    <style:style style:name="P56" style:family="paragraph" style:parent-style-name="Text_20_body" style:list-style-name="L17"/>
    <style:style style:name="P57" style:family="paragraph" style:parent-style-name="Text_20_body" style:list-style-name="L17">
      <style:paragraph-properties fo:margin-top="0in" fo:margin-bottom="0in" style:contextual-spacing="false"/>
    </style:style>
    <style:style style:name="P58" style:family="paragraph" style:parent-style-name="Text_20_body" style:list-style-name="L17">
      <style:paragraph-properties fo:margin-left="0in" fo:margin-right="0in" fo:margin-top="0in" fo:margin-bottom="0in" style:contextual-spacing="false" fo:text-indent="0in" style:auto-text-indent="false"/>
    </style:style>
    <style:style style:name="P59" style:family="paragraph" style:parent-style-name="Text_20_body" style:list-style-name="L18"/>
    <style:style style:name="P60" style:family="paragraph" style:parent-style-name="Text_20_body" style:list-style-name="L18">
      <style:paragraph-properties fo:margin-top="0in" fo:margin-bottom="0in" style:contextual-spacing="false"/>
    </style:style>
    <style:style style:name="P61" style:family="paragraph" style:parent-style-name="Text_20_body" style:list-style-name="L18">
      <style:paragraph-properties fo:margin-left="0in" fo:margin-right="0in" fo:margin-top="0in" fo:margin-bottom="0in" style:contextual-spacing="false" fo:text-indent="0in" style:auto-text-indent="false"/>
    </style:style>
    <style:style style:name="T1" style:family="text">
      <style:text-properties fo:font-style="italic"/>
    </style:style>
    <style:style style:name="T2" style:family="text">
      <style:text-properties fo:font-weight="bold"/>
    </style:style>
    <style:style style:name="T3" style:family="text">
      <style:text-properties fo:color="#bbbebf" loext:opacity="100%" style:font-name="Droid Sans Mono" fo:font-size="10.5pt" fo:font-weight="normal" fo:background-color="#121314" loext:char-shading-value="0"/>
    </style:style>
    <style:style style:name="T4" style:family="text">
      <style:text-properties fo:color="#bbbebf" loext:opacity="100%" fo:font-size="15pt"/>
    </style:style>
    <style:style style:name="T5" style:family="text">
      <style:text-properties fo:color="#c9d1d9" loext:opacity="100%" fo:font-weight="bold"/>
    </style:style>
    <style:style style:name="T6" style:family="text">
      <style:text-properties fo:color="#c9d1d9" loext:opacity="100%" fo:font-style="italic"/>
    </style:style>
    <style:style style:name="T7" style:family="text">
      <style:text-properties fo:color="#ffa657" loext:opacity="100%"/>
    </style:style>
    <style:style style:name="T8" style:family="text">
      <style:text-properties fo:color="#79c0ff" loext:opacity="100%" style:font-name="Droid Sans Mono" fo:background-color="#121314" loext:char-shading-value="0"/>
    </style:style>
    <style:style style:name="T9" style:family="text">
      <style:text-properties fo:color="#79c0ff" loext:opacity="100%" style:font-name="Droid Sans Mono" fo:font-weight="bold" fo:background-color="#121314" loext:char-shading-value="0"/>
    </style:style>
    <style:style style:name="T10" style:family="text">
      <style:text-properties fo:color="#79c0ff" loext:opacity="100%" fo:background-color="#121314" loext:char-shading-value="0"/>
    </style:style>
    <style:style style:name="T11" style:family="text">
      <style:text-properties fo:color="#79c0ff" loext:opacity="100%" style:text-line-through-style="none" style:text-line-through-type="none" style:font-name="Google Sans" fo:font-size="12pt" style:text-underline-style="none" fo:font-weight="normal" style:text-blinking="false" fo:background-color="#121314" loext:char-shading-value="0" loext:padding="0in" loext:border="none"/>
    </style:style>
    <style:style style:name="T12" style:family="text">
      <style:text-properties fo:color="#79c0ff" loext:opacity="100%" style:text-line-through-style="none" style:text-line-through-type="none" style:font-name="Google Sans" style:text-underline-style="none" fo:font-weight="normal" style:text-blinking="false" fo:background-color="#121314" loext:char-shading-value="0" loext:padding="0in" loext:border="none"/>
    </style:style>
    <style:style style:name="T13" style:family="text">
      <style:text-properties fo:color="#79c0ff" loext:opacity="100%" style:text-line-through-style="none" style:text-line-through-type="none" style:font-name="Google Sans" style:text-underline-style="none" style:text-blinking="false" fo:background-color="#121314" loext:char-shading-value="0" loext:padding="0in" loext:border="none"/>
    </style:style>
    <style:style style:name="T14" style:family="text">
      <style:text-properties fo:color="#79c0ff" loext:opacity="100%" style:text-line-through-style="none" style:text-line-through-type="none" fo:font-size="12pt" style:text-underline-style="none" fo:font-weight="normal" style:text-blinking="false" fo:background-color="#121314" loext:char-shading-value="0" loext:padding="0in" loext:border="none"/>
    </style:style>
    <style:style style:name="T15" style:family="text">
      <style:text-properties fo:color="#79c0ff" loext:opacity="100%" style:text-line-through-style="none" style:text-line-through-type="none" style:text-underline-style="none" fo:font-weight="normal" style:text-blinking="false" fo:background-color="#121314" loext:char-shading-value="0" loext:padding="0in" loext:border="none"/>
    </style:style>
    <style:style style:name="T16" style:family="text">
      <style:text-properties fo:color="#79c0ff" loext:opacity="100%" style:text-line-through-style="none" style:text-line-through-type="none" style:text-underline-style="none" fo:font-weight="normal" style:text-blinking="false" loext:padding="0in" loext:border="none"/>
    </style:style>
    <style:style style:name="T17" style:family="text">
      <style:text-properties fo:color="#d4d4d4" loext:opacity="100%"/>
    </style:style>
    <style:style style:name="T18" style:family="text">
      <style:text-properties fo:color="#ff7b72" loext:opacity="100%"/>
    </style:style>
    <style:style style:name="T19" style:family="text">
      <style:text-properties fo:color="#d2a8ff" loext:opacity="100%"/>
    </style:style>
    <style:style style:name="T20" style:family="text">
      <style:text-properties style:text-line-through-style="none" style:text-line-through-type="none" style:text-underline-style="none" fo:font-weight="normal" style:text-blinking="false" loext:padding="0in" loext:border="none"/>
    </style:style>
    <style:style style:name="T21" style:family="text">
      <style:text-properties style:text-line-through-style="none" style:text-line-through-type="none" style:text-underline-style="none" style:text-blinking="false" loext:padding="0in" loext:border="none"/>
    </style:style>
    <style:style style:name="T22" style:family="text">
      <style:text-properties style:text-line-through-style="none" style:text-line-through-type="none" style:font-name="Google Sans1" fo:font-size="12pt" style:text-underline-style="none" fo:font-weight="bold" style:text-blinking="false" loext:padding="0in" loext:border="none"/>
    </style:style>
    <style:style style:name="T23" style:family="text">
      <style:text-properties style:text-line-through-style="none" style:text-line-through-type="none" style:font-name="Google Sans1" fo:font-size="12pt" style:text-underline-style="none" fo:font-weight="bold" officeooo:rsid="000b7231" style:text-blinking="false" loext:padding="0in" loext:border="none"/>
    </style:style>
    <style:style style:name="T24" style:family="text">
      <style:text-properties style:text-line-through-style="none" style:text-line-through-type="none" style:font-name="Google Sans1" fo:font-size="12pt" style:text-underline-style="none" fo:font-weight="bold" officeooo:rsid="000d2131" style:text-blinking="false" loext:padding="0in" loext:border="none"/>
    </style:style>
    <style:style style:name="T25" style:family="text">
      <style:text-properties style:text-line-through-style="none" style:text-line-through-type="none" style:font-name="Google Sans1" fo:font-size="12pt" style:text-underline-style="none" fo:font-weight="normal" style:text-blinking="false" loext:padding="0in" loext:border="none"/>
    </style:style>
    <style:style style:name="T26" style:family="text">
      <style:text-properties style:text-line-through-style="none" style:text-line-through-type="none" style:font-name="Google Sans1" fo:font-size="12pt" style:text-underline-style="none" fo:font-weight="normal" style:text-blinking="false" style:font-weight-asian="normal" style:font-weight-complex="normal" loext:padding="0in" loext:border="none"/>
    </style:style>
    <style:style style:name="T27" style:family="text">
      <style:text-properties style:text-line-through-style="none" style:text-line-through-type="none" style:font-name="Google Sans1" fo:font-size="12pt" style:text-underline-style="none" fo:font-weight="normal" officeooo:rsid="000d2131" style:text-blinking="false" loext:padding="0in" loext:border="none"/>
    </style:style>
    <style:style style:name="T28" style:family="text">
      <style:text-properties style:text-line-through-style="none" style:text-line-through-type="none" style:font-name="monospace" fo:font-size="10.5pt" style:text-underline-style="none" fo:font-weight="normal" style:text-blinking="false" loext:padding-left="0in" loext:padding-right="0in" loext:padding-top="0in" loext:padding-bottom="0.0193in" loext:border-left="none" loext:border-right="none" loext:border-top="none" loext:border-bottom="0.06pt solid #2c2e35"/>
    </style:style>
    <style:style style:name="T29" style:family="text">
      <style:text-properties style:text-line-through-style="none" style:text-line-through-type="none" fo:font-size="12pt" style:text-underline-style="none" fo:font-weight="bold" style:text-blinking="false" loext:padding="0in" loext:border="none"/>
    </style:style>
    <style:style style:name="T30" style:family="text">
      <style:text-properties style:text-line-through-style="none" style:text-line-through-type="none" fo:font-size="12pt" style:text-underline-style="none" fo:font-weight="bold" officeooo:rsid="000d2131" style:text-blinking="false" loext:padding="0in" loext:border="none"/>
    </style:style>
    <style:style style:name="T31" style:family="text">
      <style:text-properties style:text-line-through-style="none" style:text-line-through-type="none" fo:font-size="12pt" style:text-underline-style="none" fo:font-weight="bold" officeooo:rsid="000b7231" style:text-blinking="false" loext:padding="0in" loext:border="none"/>
    </style:style>
    <style:style style:name="T32" style:family="text">
      <style:text-properties style:text-line-through-style="none" style:text-line-through-type="none" fo:font-size="12pt" style:text-underline-style="none" fo:font-weight="normal" style:text-blinking="false" loext:padding="0in" loext:border="none"/>
    </style:style>
    <style:style style:name="T33" style:family="text">
      <style:text-properties style:text-line-through-style="none" style:text-line-through-type="none" fo:font-size="12pt" style:text-underline-style="none" fo:font-weight="normal" style:text-blinking="false" style:font-weight-asian="normal" style:font-weight-complex="normal" loext:padding="0in" loext:border="none"/>
    </style:style>
    <style:style style:name="T34" style:family="text">
      <style:text-properties style:text-line-through-style="none" style:text-line-through-type="none" fo:font-size="12pt" style:text-underline-style="none" fo:font-weight="normal" officeooo:rsid="000d2131" style:text-blinking="false" loext:padding="0in" loext:border="none"/>
    </style:style>
    <style:style style:name="T35" style:family="text">
      <style:text-properties style:text-line-through-style="none" style:text-line-through-type="none" fo:font-size="10.5pt" style:text-underline-style="none" fo:font-weight="normal" style:text-blinking="false" loext:padding-left="0in" loext:padding-right="0in" loext:padding-top="0in" loext:padding-bottom="0.0193in" loext:border-left="none" loext:border-right="none" loext:border-top="none" loext:border-bottom="0.06pt solid #2c2e35"/>
    </style:style>
    <style:style style:name="T36" style:family="text">
      <style:text-properties style:text-line-through-style="none" style:text-line-through-type="none" style:font-name="Google Sans" fo:font-size="12pt" style:text-underline-style="none" fo:font-weight="bold" style:text-blinking="false" loext:padding="0in" loext:border="none"/>
    </style:style>
    <style:style style:name="T37" style:family="text">
      <style:text-properties style:text-line-through-style="none" style:text-line-through-type="none" style:font-name="Google Sans" fo:font-size="12pt" style:text-underline-style="none" fo:font-weight="bold" officeooo:rsid="000d2131" style:text-blinking="false" loext:padding="0in" loext:border="none"/>
    </style:style>
    <style:style style:name="T38" style:family="text">
      <style:text-properties style:text-line-through-style="none" style:text-line-through-type="none" style:font-name="Google Sans" fo:font-size="12pt" style:text-underline-style="none" fo:font-weight="bold" officeooo:rsid="000b7231" style:text-blinking="false" loext:padding="0in" loext:border="none"/>
    </style:style>
    <style:style style:name="T39" style:family="text">
      <style:text-properties style:text-line-through-style="none" style:text-line-through-type="none" style:font-name="Google Sans" fo:font-size="12pt" style:text-underline-style="none" fo:font-weight="normal" style:text-blinking="false" loext:padding="0in" loext:border="none"/>
    </style:style>
    <style:style style:name="T40" style:family="text">
      <style:text-properties style:text-line-through-style="none" style:text-line-through-type="none" style:font-name="Google Sans" fo:font-size="12pt" style:text-underline-style="none" fo:font-weight="normal" style:text-blinking="false" style:font-weight-asian="normal" style:font-weight-complex="normal" loext:padding="0in" loext:border="none"/>
    </style:style>
    <style:style style:name="T41" style:family="text">
      <style:text-properties style:text-line-through-style="none" style:text-line-through-type="none" style:font-name="Google Sans" fo:font-size="12pt" style:text-underline-style="none" fo:font-weight="normal" officeooo:rsid="000d2131" style:text-blinking="false" loext:padding="0in" loext:border="none"/>
    </style:style>
    <style:style style:name="T42" style:family="text">
      <style:text-properties style:text-line-through-style="none" style:text-line-through-type="none" style:font-name="Google Sans" fo:font-size="12pt" style:text-underline-style="none" fo:font-weight="normal" officeooo:rsid="0010686b" style:text-blinking="false" loext:padding="0in" loext:border="none"/>
    </style:style>
    <style:style style:name="T43" style:family="text">
      <style:text-properties style:text-line-through-style="none" style:text-line-through-type="none" style:font-name="Google Sans" fo:font-size="10.5pt" style:text-underline-style="none" fo:font-weight="normal" style:text-blinking="false" loext:padding-left="0in" loext:padding-right="0in" loext:padding-top="0in" loext:padding-bottom="0.0193in" loext:border-left="none" loext:border-right="none" loext:border-top="none" loext:border-bottom="0.06pt solid #2c2e35"/>
    </style:style>
    <style:style style:name="T44" style:family="text">
      <style:text-properties style:text-line-through-style="none" style:text-line-through-type="none" style:font-name="Google Sans" style:text-underline-style="none" style:text-blinking="false" fo:background-color="#121314" loext:char-shading-value="0" loext:padding="0in" loext:border="none"/>
    </style:style>
    <style:style style:name="T45" style:family="text">
      <style:text-properties style:text-line-through-style="none" style:text-line-through-type="none" style:font-name="Google Sans" style:text-underline-style="none" style:text-blinking="false" loext:padding="0in" loext:border="none"/>
    </style:style>
    <style:style style:name="T46" style:family="text">
      <style:text-properties officeooo:rsid="000d2131"/>
    </style:style>
    <style:style style:name="T47" style:family="text">
      <style:text-properties style:font-name="Google Sans"/>
    </style:style>
    <style:style style:name="T48" style:family="text">
      <style:text-properties style:font-name="Google Sans" fo:font-weight="bold"/>
    </style:style>
    <style:style style:name="T49" style:family="text">
      <style:text-properties style:font-name="Google Sans" fo:font-style="italic"/>
    </style:style>
    <style:style style:name="T50" style:family="text">
      <style:text-properties officeooo:rsid="0010f892"/>
    </style:style>
    <style:style style:name="T51" style:family="text">
      <style:text-properties officeooo:rsid="00117d37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-0.1965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-0.1965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3"><text:span text:style-name="T45">TOPIC 1: Zero-Shot Code-Switched Speech Synthesis</text:span></text:h>
      <text:p text:style-name="P24"><text:bookmark text:name="user-content-topic-1-zero-shot-code-switched-speech-synthesis"/><text:span text:style-name="Strong_20_Emphasis">Target Track:</text:span> Speech and Language Processing (SLP) – <text:span text:style-name="Emphasis">Text-to-Speech Synthesis &amp; Voice Cloning</text:span> <text:span text:style-name="Emphasis">How your project relates (Optional Motivation):</text:span> This generalizes your observation of Coqui XTTS breaking down, babbling, or losing attention when switching between English and Hindi/Hinglish.</text:p>
      <text:h text:style-name="Heading_20_4" text:outline-level="4">1. The Core Academic Research Problem</text:h>
      <text:p text:style-name="P24"><text:bookmark text:name="user-content-1-the-core-academic-research-problem"/>Autoregressive (AR) zero-shot TTS architectures suffer from severe <text:span text:style-name="Strong_20_Emphasis">Cross-Attention Alignment Drift</text:span> and prosodic degradation when synthesizing intra-sentential code-switched text (e.g., alternating between Latin/ASCII and Brahmic/Devanagari scripts). Because the attention matrices are trained predominantly on monolingual datasets, script density mismatches cause attention collapse, resulting in acoustic hallucinations, trailing babble, or failure to emit clean End-of-Sequence (EOS) tokens.</text:p>
      <text:h text:style-name="Heading_20_4" text:outline-level="4">2. Research-Based Methodology (What to develop &amp; test)</text:h>
      <text:list text:style-name="L7">
        <text:list-item>
          <text:p text:style-name="P31"><text:bookmark text:name="user-content-2-research-based-methodology-what-to-develop--test"/><text:span text:style-name="Strong_20_Emphasis">Phoneme-Aligned Cross-Attention Entropy Regularization:</text:span> Instead of feeding raw text or characters, map all multilingual text into a <text:span text:style-name="Strong_20_Emphasis">Universal Phonetic Representation</text:span> (e.g., International Phonetic Alphabet [IPA] or X-SAMPA) using a shared embedding bottleneck. </text:p>
        </text:list-item>
        <text:list-item>
          <text:p text:style-name="P30">Introduce a custom <text:span text:style-name="Strong_20_Emphasis">Attention Entropy Loss Function ( )</text:span> during fine-tuning. This mathematically penalizes high-entropy (scattered) attention matrices at script-transition boundaries, forcing the neural decoder to maintain monotonic alignment across code-switching points without manual text padding. </text:p>
        </text:list-item>
      </text:list>
      <text:h text:style-name="Heading_20_4" text:outline-level="4">3. Standard Academic Datasets</text:h>
      <text:list text:style-name="L8">
        <text:list-item>
          <text:p text:style-name="P34"><text:bookmark text:name="user-content-3-standard-academic-datasets"/><text:span text:style-name="Strong_20_Emphasis">SEAME (South East Asia Mandarin-English):</text:span> The global academic standard benchmark for spontaneous code-switched speech processing. </text:p>
        </text:list-item>
        <text:list-item>
          <text:p text:style-name="P33"><text:span text:style-name="Strong_20_Emphasis">FLEURS (Few-shot Learning Evaluation of Universal Representations of Speech):</text:span> Google’s 102-language benchmark; standard for evaluating zero-shot multilingual voice cloning. </text:p>
        </text:list-item>
        <text:list-item>
          <text:p text:style-name="P32"><text:span text:style-name="Strong_20_Emphasis">CS-Hindi-English / IndicTTS:</text:span> Public, standardized Indic speech corpora maintained by IIT Madras and AI4Bharat. </text:p>
        </text:list-item>
      </text:list>
      <text:h text:style-name="Heading_20_4" text:outline-level="4">4. Standard Evaluation Metrics</text:h>
      <text:list text:style-name="L9">
        <text:list-item>
          <text:p text:style-name="P37"><text:bookmark text:name="user-content-4-standard-evaluation-metrics"/><text:span text:style-name="Strong_20_Emphasis">MCD (Mel-Cepstral Distortion) :</text:span> Measures acoustic spectral fidelity against ground truth (lower is better). </text:p>
        </text:list-item>
        <text:list-item>
          <text:p text:style-name="P36"><text:span text:style-name="Strong_20_Emphasis">SIM-R &amp; SIM-O:</text:span> Cosine similarity of speaker embeddings (extracted via WavLM or ECAPA-TDNN) between the reference speaker audio and the generated speech to prove identity preservation. </text:p>
        </text:list-item>
        <text:list-item>
          <text:p text:style-name="P36"><text:span text:style-name="Strong_20_Emphasis">ASR-WER / CER (Word/Character Error Rate):</text:span> Passing the synthesized audio through an external, frozen ASR (e.g., Whisper-Large) to objectively measure intelligibility and verify that code-switched words were not skipped or hallucinated. </text:p>
        </text:list-item>
        <text:list-item>
          <text:p text:style-name="P35"><text:span text:style-name="Strong_20_Emphasis">CMOS (Comparative Mean Opinion Score):</text:span> Subjective blind evaluation by native bilingual speakers grading naturalness on a -3 to +3 scale. </text:p>
        </text:list-item>
      </text:list>
      <text:p text:style-name="P13"><text:span text:style-name="T11"/></text:p>
      <text:h text:style-name="P6" text:outline-level="3"><text:soft-page-break/><text:span text:style-name="T21">TOPIC 2: Low-Latency Streaming Speech-to-Speech Translation (S2ST)</text:span></text:h>
      <text:p text:style-name="P24"><text:bookmark text:name="user-content-topic-2-low-latency-streaming-speech-to-speech-translation-s2st"/><text:span text:style-name="Strong_20_Emphasis">Target Track:</text:span> Machine Learning for Signal Processing (MLSP) / SLP – <text:span text:style-name="Emphasis">Spoken Language Translation &amp; Streaming Architectures</text:span> <text:span text:style-name="Emphasis">How your project relates (Optional Motivation):</text:span> This generalizes your attempt to use SeamlessM4T v2 and your struggles with high Time-To-First-Audio (TTFA) due to structural tag blockades.</text:p>
      <text:h text:style-name="Heading_20_4" text:outline-level="4">1. The Core Academic Research Problem</text:h>
      <text:p text:style-name="P24"><text:bookmark text:name="user-content-1-the-core-academic-research-problem-1"/>Direct Speech-to-Speech Translation (S2ST) foundation models (such as Meta’s SeamlessM4T UnitY2 architecture) operate offline: they require the full source audio sentence before emitting target speech units. Transforming these into <text:span text:style-name="Strong_20_Emphasis">Simultaneous / Streaming S2ST</text:span> models leads to a strict trade-off: firing speech tokens too early results in semantic hallucination due to missing context, whereas waiting for context inflates the <text:span text:style-name="Strong_20_Emphasis">Ear-Voice Span (EVS)</text:span> beyond real-time conversational limits.</text:p>
      <text:h text:style-name="Heading_20_4" text:outline-level="4">2. Research-Based Methodology (What to develop &amp; test)</text:h>
      <text:list text:style-name="L10">
        <text:list-item>
          <text:p text:style-name="P38"><text:bookmark text:name="user-content-2-research-based-methodology-what-to-develop--test-1"/><text:span text:style-name="Strong_20_Emphasis">Continuous Integrate-and-Fire (CIF) with Speculative Causal Decoding:</text:span> Implement a non-autoregressive acoustic unit streaming module. Place a mathematical <text:span text:style-name="Strong_20_Emphasis">CIF boundary predictor</text:span> over the speech encoder that accumulates acoustic weights frame-by-frame. </text:p>
        </text:list-item>
        <text:list-item>
          <text:p text:style-name="P39">When the accumulated weight crosses a learned threshold , it dynamically fires an acoustic unit to the vocoder while using a <text:span text:style-name="Strong_20_Emphasis">causal cross-attention mask</text:span> over future frames. You train this using a joint optimization loss: L<text:span text:style-name="Emphasis">text{total} = L</text:span>text{translation} + <text:span text:style-name="T51">a</text:span>Ltext{latency}, proving mathematically that your model optimizes the EVS-to-BLEU Pareto frontier. </text:p>
        </text:list-item>
      </text:list>
      <text:h text:style-name="Heading_20_4" text:outline-level="4">3. Standard Academic Datasets</text:h>
      <text:list text:style-name="L11">
        <text:list-item>
          <text:p text:style-name="P42"><text:bookmark text:name="user-content-3-standard-academic-datasets-1"/><text:span text:style-name="Strong_20_Emphasis">CVSS (Common Voice Speech-to-Speech Translation):</text:span> Created by Google; the industry-standard benchmark for direct speech-to-speech translation across 21 languages (includes English Indic language pairs). </text:p>
        </text:list-item>
        <text:list-item>
          <text:p text:style-name="P41"><text:span text:style-name="Strong_20_Emphasis">CoVoST 2:</text:span> A large-scale multilingual speech translation benchmark created by Meta. </text:p>
        </text:list-item>
        <text:list-item>
          <text:p text:style-name="P40"><text:span text:style-name="Strong_20_Emphasis">Europarl-ST:</text:span> Standard benchmark for simultaneous speech translation. </text:p>
        </text:list-item>
      </text:list>
      <text:h text:style-name="Heading_20_4" text:outline-level="4">4. Standard Evaluation Metrics</text:h>
      <text:list text:style-name="L12">
        <text:list-item>
          <text:p text:style-name="P45"><text:bookmark text:name="user-content-4-standard-evaluation-metrics-1"/><text:span text:style-name="Strong_20_Emphasis">BLASER 2.0:</text:span> Meta’s state-of-the-art, reference-free AI evaluation metric specifically designed to score the semantic and acoustic quality of direct speech-to-speech translation. </text:p>
        </text:list-item>
        <text:list-item>
          <text:p text:style-name="P44"><text:span text:style-name="Strong_20_Emphasis">ASR-BLEU / sACREBLEU:</text:span> Transcribing the generated speech output via ASR and computing BLEU scores against ground-truth text translations. </text:p>
        </text:list-item>
        <text:list-item>
          <text:p text:style-name="P44"><text:span text:style-name="Strong_20_Emphasis">EVS (Ear-Voice Span) :</text:span> The exact time delay between when a word is spoken in the source audio and when its translation is synthesized in the target audio. </text:p>
        </text:list-item>
        <text:list-item>
          <text:p text:style-name="P43"><text:span text:style-name="Strong_20_Emphasis">AL (Average Lagging) &amp; AP (Average Proportion):</text:span> Standard mathematical metrics for simultaneous speech translation latency. </text:p>
        </text:list-item>
      </text:list>
      <text:p text:style-name="P16"/>
      <text:h text:style-name="P5" text:outline-level="3"><text:soft-page-break/>TOPIC 3: Disentangled Prosody and Affect Transfer in Speech Dialog Models</text:h>
      <text:p text:style-name="P24"><text:bookmark text:name="user-content-topic-3-disentangled-prosody-and-affect-transfer-in-speech-dialog-models"/><text:span text:style-name="Strong_20_Emphasis">Target Track:</text:span> Multimedia Signal Processing (MMSP) / SLP – <text:span text:style-name="Emphasis">Speech Emotion Recognition &amp; Prosodic Modeling</text:span> <text:span text:style-name="Emphasis">How your project relates (Optional Motivation):</text:span> This generalizes your challenge of "robotic empathy" where the AI understands semantic distress in text but speaks in a flat, detached voice.</text:p>
      <text:h text:style-name="Heading_20_4" text:outline-level="4">1. The Core Academic Research Problem</text:h>
      <text:p text:style-name="P24"><text:bookmark text:name="user-content-1-the-core-academic-research-problem-2"/>Current audio-in/audio-out dialogue models treat discrete speech tokens (e.g., EnCodec or Mimi units) as a flattened, 1D acoustic sequence. This mathematically entangles semantic linguistic content with speaker identity and emotional prosody. When dialogue models generate responses, they suffer from <text:span text:style-name="Strong_20_Emphasis">"Prosodic Flattening"</text:span>—regressing to an average, neutral training prosody that fails to mirror the user's emotional urgency or affective state.</text:p>
      <text:h text:style-name="Heading_20_4" text:outline-level="4">2. Research-Based Methodology (What to develop &amp; test)</text:h>
      <text:list text:style-name="L13">
        <text:list-item>
          <text:p text:style-name="P47"><text:bookmark text:name="user-content-2-research-based-methodology-what-to-develop--test-2"/><text:span text:style-name="Strong_20_Emphasis">Information-Theoretic Disentanglement via Residual VQ-VAE:</text:span> Design a neural speech tokenizer that splits acoustic representations into three orthogonal subspaces using mutual information minimization: a <text:span text:style-name="Strong_20_Emphasis">Semantic Space</text:span> ( ), a <text:span text:style-name="Strong_20_Emphasis">Speaker Identity Space</text:span> ( ), and a <text:span text:style-name="Strong_20_Emphasis">Prosodic-Affective Space</text:span> ( , capturing , energy, and jitter). </text:p>
        </text:list-item>
        <text:list-item>
          <text:p text:style-name="P46">Implement an <text:span text:style-name="Strong_20_Emphasis">Acoustic Affective Biasing Layer</text:span>: During dialogue generation, the language model predicts only the semantic tokens ( ), while a parallel lightweight graph predictor calculates the target prosodic trajectory ( ) conditioned on the input speech emotion. The vocoder synthesizes them together, achieving true zero-shot emotional mirroring. </text:p>
        </text:list-item>
      </text:list>
      <text:h text:style-name="Heading_20_4" text:outline-level="4">3. Standard Academic Datasets</text:h>
      <text:list text:style-name="L14">
        <text:list-item>
          <text:p text:style-name="P50"><text:bookmark text:name="user-content-3-standard-academic-datasets-2"/><text:span text:style-name="Strong_20_Emphasis">IEMOCAP (Interactive Emotional Dyadic Motion Capture):</text:span> The universal gold standard academic dataset for emotion recognition and affective speech processing. </text:p>
        </text:list-item>
        <text:list-item>
          <text:p text:style-name="P49"><text:span text:style-name="Strong_20_Emphasis">ESD (Emotional Speech Dataset):</text:span> High-quality multilingual dataset (English/Mandarin) with 350,000 utterances across distinct emotional states (Happy, Sad, Angry, Surprise, Neutral). </text:p>
        </text:list-item>
        <text:list-item>
          <text:p text:style-name="P48"><text:span text:style-name="Strong_20_Emphasis">MSP-Podcast:</text:span> Large-scale real-world emotional speech dataset widely used in recent IEEE SER papers. </text:p>
        </text:list-item>
      </text:list>
      <text:h text:style-name="Heading_20_4" text:outline-level="4">4. Standard Evaluation Metrics</text:h>
      <text:list text:style-name="L15">
        <text:list-item>
          <text:p text:style-name="P53"><text:bookmark text:name="user-content-4-standard-evaluation-metrics-2"/><text:span text:style-name="Strong_20_Emphasis">PCC (Pearson Correlation Coefficient) &amp; RMSE:</text:span> Computed on the fundamental frequency ( ) and energy contours between the target emotion contour and the synthesized speech contour. </text:p>
        </text:list-item>
        <text:list-item>
          <text:p text:style-name="P52"><text:span text:style-name="Strong_20_Emphasis">SER-UAR (Unweighted Average Recall) :</text:span> Passing the generated audio into a standardized, frozen Speech Emotion Recognition classifier (e.g., WavLM-SER) to verify if the output audio is mathematically classified as the target emotion (e.g., "Empathetic/Comforting" vs "Neutral"). </text:p>
        </text:list-item>
        <text:list-item>
          <text:p text:style-name="P52"><text:span text:style-name="Strong_20_Emphasis">MCD &amp; FFE (F0 Frame Error):</text:span> Standard spectral and pitch distortion metrics. </text:p>
        </text:list-item>
        <text:list-item>
          <text:p text:style-name="P51"><text:span text:style-name="Strong_20_Emphasis">MOS-P (Prosody Mean Opinion Score):</text:span> Subjective grading focused strictly on emotional expressiveness and vocal inflection. </text:p>
        </text:list-item>
      </text:list>
      <text:h text:style-name="P5" text:outline-level="3"><text:soft-page-break/>TOPIC 4: Hardware-Aware Quantization &amp; Speculative Decoding for Edge Speech Foundation Models</text:h>
      <text:p text:style-name="P24"><text:bookmark text:name="user-content-topic-4-hardware-aware-quantization--speculative-decoding-for-edge-speech-foundation-models"/><text:span text:style-name="Strong_20_Emphasis">Target Track:</text:span> Applied Signal Processing Systems (ASPS) – <text:span text:style-name="Emphasis">Efficient Edge Implementation &amp; Hardware-Co-Design</text:span> <text:span text:style-name="Emphasis">How your project relates (Optional Motivation):</text:span> This generalizes your experiments running Blackwell GPUs, CPU-first initialization workarounds, VRAM limits, and tracking Joules/turn.</text:p>
      <text:h text:style-name="Heading_20_4" text:outline-level="4">1. The Core Academic Research Problem</text:h>
      <text:p text:style-name="P24"><text:bookmark text:name="user-content-1-the-core-academic-research-problem-3"/>Deploying large Speech Foundation Models (such as Whisper-Large, SeamlessM4T, or multimodal audio-LLMs) on edge workstations introduces severe VRAM and memory-bandwidth bottlenecks. While standard <text:span text:style-name="Strong_20_Emphasis">Post-Training Quantization (PTQ)</text:span> works well for text LLMs, speech transformer activations exhibit massive, continuous outlier spikes in their acoustic cross-attention layers. Applying standard INT4/INT8 quantization to speech models causes catastrophic degradation in Word Error Rate (WER) and spectral reconstruction.</text:p>
      <text:h text:style-name="Heading_20_4" text:outline-level="4">2. Research-Based Methodology (What to develop &amp; test)</text:h>
      <text:list text:style-name="L16">
        <text:list-item>
          <text:p text:style-name="P55"><text:bookmark text:name="user-content-2-research-based-methodology-what-to-develop--test-3"/><text:span text:style-name="Strong_20_Emphasis">Outlier-Aware Mixed-Precision Quantization (W4A8-Speech):</text:span> Formulate a mathematically derived quantization scheme that applies FP8 or INT8 scaling dynamically only to acoustic attention matrices containing activation outliers (&gt; percentile), while aggressively compressing feed-forward linear weights to INT4. </text:p>
        </text:list-item>
        <text:list-item>
          <text:p text:style-name="P54"><text:span text:style-name="Strong_20_Emphasis">Acoustic Speculative Decoding:</text:span> Implement a lightweight, 100M-parameter "Draft Acoustic Model" that speculatively predicts 4–8 audio codec tokens ahead of time, which are then verified in parallel by the large Speech Foundation Model. This fundamentally bypasses memory-bandwidth bottlenecks on edge GPUs without altering the final output math. </text:p>
        </text:list-item>
      </text:list>
      <text:h text:style-name="Heading_20_4" text:outline-level="4">3. Standard Academic Datasets</text:h>
      <text:list text:style-name="L17">
        <text:list-item>
          <text:p text:style-name="P58"><text:bookmark text:name="user-content-3-standard-academic-datasets-3"/><text:span text:style-name="Strong_20_Emphasis">LibriSpeech (Clean &amp; Other - Test Sets):</text:span> The absolute universal benchmark for evaluating speech model accuracy and computational speedups. </text:p>
        </text:list-item>
        <text:list-item>
          <text:p text:style-name="P57"><text:span text:style-name="Strong_20_Emphasis">Common Voice (Mozilla):</text:span> Multilingual evaluation sets to prove quantization does not disproportionately degrade low-resource or Indic languages. </text:p>
        </text:list-item>
        <text:list-item>
          <text:p text:style-name="P56"><text:span text:style-name="Strong_20_Emphasis">MLPerf Inference Benchmark Suite:</text:span> Standard framework for edge AI hardware latency/energy benchmarking. </text:p>
        </text:list-item>
      </text:list>
      <text:h text:style-name="Heading_20_4" text:outline-level="4">4. Standard Evaluation Metrics</text:h>
      <text:list text:style-name="L18">
        <text:list-item>
          <text:p text:style-name="P61"><text:bookmark text:name="user-content-4-standard-evaluation-metrics-3"/><text:span text:style-name="Strong_20_Emphasis">RTF (Real-Time Factor):</text:span> The ratio of processing time to audio duration ( ). An is mandatory for real-time edge streaming; aim to prove your methodology drops RTF from down to . </text:p>
        </text:list-item>
        <text:list-item>
          <text:p text:style-name="P60"><text:span text:style-name="Strong_20_Emphasis">Energy per Token / Turn :</text:span> Measured rigorously using NVML, Intel RAPL, or external hardware power meters. </text:p>
        </text:list-item>
        <text:list-item>
          <text:p text:style-name="P60"><text:span text:style-name="Strong_20_Emphasis">Memory Bandwidth Utilization &amp; Peak VRAM :</text:span> Measuring the exact hardware footprint reduction. </text:p>
        </text:list-item>
        <text:list-item>
          <text:p text:style-name="P59"><text:soft-page-break/><text:span text:style-name="Strong_20_Emphasis"><text:span text:style-name="T50">Del </text:span></text:span><text:span text:style-name="Strong_20_Emphasis">WER / </text:span><text:span text:style-name="Strong_20_Emphasis"><text:span text:style-name="T50">Del </text:span></text:span><text:span text:style-name="Strong_20_Emphasis">CER :</text:span> The exact degradation in recognition or synthesis accuracy compared to the unquantized FP16 baseline model (proving that your quantization achieved massive speedups with accuracy loss). </text:p>
        </text:list-item>
      </text:list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Google Sans" svg:font-family="'Google Sans'" style:font-family-generic="swiss"/>
    <style:font-face style:name="Google Sans1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14T12:36:48.814282601</meta:creation-date>
    <dc:date>2026-07-14T15:53:39.821986307</dc:date>
    <meta:editing-duration>PT24M55S</meta:editing-duration>
    <meta:editing-cycles>1</meta:editing-cycles>
    <meta:document-statistic meta:table-count="0" meta:image-count="0" meta:object-count="0" meta:page-count="5" meta:paragraph-count="64" meta:word-count="1420" meta:character-count="10610" meta:non-whitespace-character-count="9252"/>
    <meta:generator>LibreOffice/24.2.7.2$Linux_AARCH64 LibreOffice_project/420$Build-2</meta:generator>
  </office:meta>
</office:document-meta>
</file>